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Depth 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The numeric value of the depth of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9"/>
          <table:table-cell table:number-columns-repeated="997"/>
        </table:table-row>
        <table:table-row table:style-name="ro4" table:number-rows-repeated="1047575">
          <table:table-cell table:number-columns-repeated="1026"/>
        </table:table-row>
        <table:table-row table:style-name="ro4">
          <table:table-cell table:number-columns-repeated="1026"/>
        </table:table-row>
      </table:table>
      <table:table table:name="Groundwater Quality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Depth 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One of the following:</text:span></text:p>
            <text:p><text:span text:style-name="T1">• (blank)</text:span></text:p>
            <text:p><text:span text:style-name="T1">• S/m</text:span></text:p>
            <text:p><text:span text:style-name="T1">• μS/cm</text:span></text:p>
            <text:p><text:span text:style-name="T1">• </text:span><text:span text:style-name="T2">°</text:span><text:span text:style-name="T3">C</text:span></text:p>
            <text:p><text:span text:style-name="T1">• °F</text:span></text:p>
            <text:p><text:span text:style-name="T1">• °K</text:span></text:p>
            <text:p><text:span text:style-name="T1">• mg/L</text:span></text:p>
            <text:p><text:span text:style-name="T1">• ppm</text:span></text:p>
            <text:p><text:span text:style-name="T1">• ng/L</text:span></text:p>
            <text:p><text:span text:style-name="T1">• μg/L</text:span></text:p>
            <text:p><text:span text:style-name="T1">• cfu per mL</text:span></text:p>
            <text:p><text:span text:style-name="T1">• cfu per 100 ml</text:span></text:p>
          </table:table-cell>
          <table:table-cell table:style-name="ce2" office:value-type="string" calcext:value-type="string">
            <text:p>The numeric value of the depth of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9"/>
          <table:table-cell table:number-columns-repeated="997"/>
        </table:table-row>
        <table:table-row table:style-name="ro4" table:number-rows-repeated="1047575">
          <table:table-cell table:number-columns-repeated="1026"/>
        </table:table-row>
        <table:table-row table:style-name="ro4">
          <table:table-cell table:number-columns-repeated="1026"/>
        </table:table-row>
      </table:table>
      <table:table table:name="Abstraction-Discharge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Depth 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1">• m</text:span><text:span text:style-name="T2">³/s</text:span></text:p>
            <text:p><text:span text:style-name="T4">• m³/m</text:span></text:p>
            <text:p><text:span text:style-name="T4">• m³/h</text:span></text:p>
            <text:p><text:span text:style-name="T4">• m³/d</text:span></text:p>
            <text:p><text:span text:style-name="T1">• ft³/s</text:span></text:p>
            <text:p><text:span text:style-name="T1">• ft³/m</text:span></text:p>
            <text:p><text:span text:style-name="T1">• ft³/h</text:span></text:p>
            <text:p><text:span text:style-name="T1">• ft³/d</text:span></text:p>
            <text:p><text:span text:style-name="T1">• L/s</text:span></text:p>
            <text:p><text:span text:style-name="T1">• L/m</text:span></text:p>
            <text:p><text:span text:style-name="T1">• L/h</text:span></text:p>
            <text:p><text:span text:style-name="T1">• L/d</text:span></text:p>
          </table:table-cell>
          <table:table-cell table:style-name="ce2" office:value-type="string" calcext:value-type="string">
            <text:p>The numeric value of the depth of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9"/>
          <table:table-cell table:number-columns-repeated="997"/>
        </table:table-row>
        <table:table-row table:style-name="ro4" table:number-rows-repeated="1047575">
          <table:table-cell table:number-columns-repeated="1026"/>
        </table:table-row>
        <table:table-row table:style-name="ro4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15:31:37.231552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ndwater_20_Level" style:display-name="PageStyle_Groundwater Lev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24.2.7.2$Linux_X86_64 LibreOffice_project/420$Build-2</meta:generator>
    <dc:date>2026-05-22T15:31:20.820825215</dc:date>
    <meta:editing-duration>PT1M36S</meta:editing-duration>
    <meta:editing-cycles>8</meta:editing-cycles>
    <meta:document-statistic meta:table-count="3" meta:cell-count="54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